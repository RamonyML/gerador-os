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777" officeooo:paragraph-rsid="00148aa3"/>
    </style:style>
    <style:style style:name="T1" style:family="text">
      <style:text-properties officeooo:rsid="00148aa3"/>
    </style:style>
    <style:style style:name="T2" style:family="text">
      <style:text-properties officeooo:rsid="0014ca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e Processo Setor Análise<text:line-break/><text:line-break/>→ Fichas canceladas <text:line-break/> → Fichas Aprovadas<text:line-break/> → Fichas negadas<text:line-break/><text:line-break/>Aqui estamos redatando apenas o processo com MK.<text:line-break/><text:line-break/>O que o setor de Análise faz no MK??? <text:line-break/><text:line-break/><text:line-break/><text:line-break/>CHEGOU UMA FICHA X, VAI NO MK (CRM: 1 BOLINHA → “+” → <text:s/>ABRE: “ASSISTENTE . NOVA LEAD” → NOME DO CLIENTE: <text:line-break/><text:line-break/><text:span text:style-name="T1">CRIAÇÃO DE LEAD NO MK: <text:line-break/></text:span><text:line-break/>SE ELA TEM CADASTRO INATIVO → ATT O END NO LAPIS → <text:span text:style-name="T1">TIRO DE INATIVO (PASSO POR TODO O FLUXO (TIRAR INATIVO É EM PESSOAS OU EMPRESAS)</text:span><text:line-break/>SE ELA TEM CADASTRO ATIVO → CONTINUA (SETINHA CANTO INFERIOR DIREITO) → LEAD CRIADA<text:line-break/><text:line-break/>“BUSCAR PRODUTOS EM GRADE”: <text:line-break/><text:line-break/> - COLOCA O PLANO SOLICITADO<text:line-break/> <text:line-break/>CLICA EM CIMA DO PLANO E DÁ O JOINHA<text:line-break/><text:line-break/>&gt; PRÓXIMO<text:line-break/><text:line-break/>CONFIRMAR VIABILIDADE DE END SOLICITADO <text:line-break/><text:line-break/>&gt; PRÓXIMO<text:line-break/><text:line-break/>EM PLANOS DISPONIVEIS COLOCAR O PLANO SOLICITADO, NOVAMENTE<text:line-break/>MARCAR NEGÓCIO FECHADO<text:line-break/>VENDEDOR <text:line-break/>VENC<text:line-break/><text:line-break/>&gt; CONFIRMAR <text:line-break/><text:line-break/><text:span text:style-name="T1">CRIAÇÃO DE CONTRATO: <text:line-break/><text:line-break/>AINDA NO CRM – HOME → EM MODAL DE NOVA LEAD AINDA → 3 BOLINHA INFERIOR (VAI ABRIR: LEADS . CONTRATOS) → “+” <text:line-break/><text:line-break/>FLUXO: <text:line-break/><text:line-break/>COLOCAR DATA DE INSTALAÇÃO<text:line-break/><text:line-break/>&gt; PRÓXIMO ATÉ A ULTIMA ABA(RENOVAÇÃO) <text:line-break/><text:line-break/></text:span><text:soft-page-break/><text:span text:style-name="T1">SELECIONAR O CHECKBOX: CONFIRMAR CRIAÇÃO DESSE CONTRATO AGORA</text:span><text:line-break/><text:line-break/><text:span text:style-name="T1">**AQUI, CRIEI OS BOLETOS E O CONTRATO.<text:line-break/><text:line-break/>AGORA PRECISAMOS CRIAR A CONEXÃO<text:line-break/><text:line-break/>AINDA EM NOVA LEADS → 4 BOLINHA → “+” (VAI ABRIR MODAL DE “CONEXÃO” <text:line-break/><text:line-break/>&gt; PRÓXIMO<text:line-break/><text:line-break/>SELECIONAR CHECKBOX: “PERMITIR DESBLOQUEIRO” <text:line-break/><text:line-break/>&gt; PRÓXIMO<text:line-break/><text:line-break/>PONTO DE ACESSO (MUDAR PARA OU ZONA LESTE OU ZONA OESTE DEPENDENDO DO BAIRRO DA SOLICITAÇÃO) <text:line-break/><text:line-break/>SERVIDOR CONCETRADOR (COLOCAR HAWUEY PATRICIA) <text:line-break/><text:line-break/>&gt; CONCLUIR <text:line-break/><text:line-break/>CRIAR O.S <text:line-break/><text:line-break/>VOLTA EM MODAL DE NOVA LEADS → ÚLTIMA BOLINHA → “+” (VAI ABRIR “nOVA O.S”) <text:line-break/><text:line-break/>&gt; PRÓXIMO 2X<text:line-break/><text:line-break/>TIPO DE O.S (COLOCAR INSTALAÇÃO E ATIVAÇÃO ** SE TIVER WF EXTEND: O.S DE INSTALAÇÃO + WI-FI EXTEND) <text:line-break/><text:line-break/>GERADOR DE O.S CRIA A O.S, COLABORADOR PEGA O TEXTO (DO GERADOR) VOLTA NO MK COLA EM “RELATO DO PROBLEMA INDICAÇÃO” <text:line-break/><text:line-break/>&gt; PRÓXIMO<text:line-break/>&gt; CONCLUIR<text:line-break/><text:line-break/><text:line-break/><text:line-break/><text:line-break/><text:line-break/><text:line-break/><text:line-break/><text:line-break/><text:line-break/><text:line-break/></text:span></text:p>
      <text:p text:style-name="P1"/>
      <text:p text:style-name="P1"/>
      <text:p text:style-name="P1"><text:span text:style-name="T1"><text:line-break/><text:line-break/></text:span><text:line-break/><text:soft-page-break/>- <text:s/>PROTOCOLO <text:s/><text:line-break/><text:line-break/> <text:s text:c="2"/><text:span text:style-name="T1">QUANDO </text:span><text:s/>NEGADA OU CANCELADA OU APROVADA EM OUTRO NOME – <text:span text:style-name="T1">FECHAM <text:line-break/><text:line-break/> <text:s text:c="3"/>- </text:span><text:span text:style-name="T2">COMENTÁRIO DE NEGADO: <text:line-break/> <text:s text:c="3"/>- COMENTÁRIO DE CANCELADO: FINALIZADOS + CANCELADOS (ENVIA MOTIVO PARA COMENTÁRIO) </text:span><text:span text:style-name="T1"><text:line-break/></text:span> <text:line-break/><text:span text:style-name="T1">QUANDO APROVADA → INSTALAÇÃO FECHA MAS ANALISE ALIMENTA COM INFOS: <text:line-break/><text:line-break/> <text:s text:c="4"/>- </text:span><text:span text:style-name="T2">PADRÃO</text:span><text:span text:style-name="T1"> (NO PV DA MARCELLA) <text:line-break/><text:line-break/></text:span><text:span text:style-name="T2">DEPOIS DE COMENTAR O PADRÃO &gt; ATENDIMENTO PAINEL &gt; 3 BOLINHA (TODOS ABERTOS) &gt; NOME DO CLIENTE &gt; PROTOCOLO &gt; NOVO COMENTÁRIO &gt; COMENTA O PADRÃO &gt; OK<text:line-break/><text:line-break/>PARA FECHAR: ENCAMINHAR ATENDIMENTO » ENVIAR PARA OUTRO SUBPROCESSO » APROVADO INSTALAÇÃO GRATUITA <text:line-break/>ou <text:line-break/>» APROVADO COMPRA DE EQUIPAMENTO <text:line-break/><text:line-break/>CONFIRMAR <text:line-break/>» APROVADO SOLICITAÇÃO NOVOS DADOS</text:span><text:span text:style-name="T1"><text:line-break/></text:span>PASSA PARA INSTALAÇÃO FECHAR → APROVADA (PASSA PELO GERADOR DE O.S) <text:s/><text:line-break/><text:line-break/> - CRIAM O CONTRATO <text:line-break/><text:line-break/> <text:s text:c="2"/><text:line-break/><text:line-break/> - CRIA CONEXÃO <text:line-break/><text:line-break/><text:line-break/><text:line-break/> - CRIA CONEXÃ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6:45:25.938599821</meta:creation-date>
    <dc:date>2026-06-23T17:14:36.488260607</dc:date>
    <meta:editing-duration>PT7M49S</meta:editing-duration>
    <meta:editing-cycles>1</meta:editing-cycles>
    <meta:document-statistic meta:table-count="0" meta:image-count="0" meta:object-count="0" meta:page-count="3" meta:paragraph-count="2" meta:word-count="422" meta:character-count="2594" meta:non-whitespace-character-count="2040"/>
    <meta:generator>LibreOffice/25.8.0.4$Linux_X86_64 LibreOffice_project/580$Build-4</meta:generator>
  </office:meta>
</office:document-meta>
</file>